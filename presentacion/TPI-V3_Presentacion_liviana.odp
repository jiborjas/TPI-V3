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9A00000850F6FB73B8.png" manifest:media-type="image/png"/>
  <manifest:file-entry manifest:full-path="Pictures/1000000100001ACD00000DDC1D9DC53C.png" manifest:media-type="image/png"/>
  <manifest:file-entry manifest:full-path="Pictures/10000001000006630000040A7C9B6753.png" manifest:media-type="image/png"/>
  <manifest:file-entry manifest:full-path="Pictures/1000000000000734000000FE27078A30.png" manifest:media-type="image/png"/>
  <manifest:file-entry manifest:full-path="Pictures/10000001000010C400000AC4FDC9457F.png" manifest:media-type="image/png"/>
  <manifest:file-entry manifest:full-path="Pictures/10000000000001E0000003604235DF79.jpg" manifest:media-type="image/jpeg"/>
  <manifest:file-entry manifest:full-path="Pictures/1000000100001ACD0000283ADEFF56A8.png" manifest:media-type="image/png"/>
  <manifest:file-entry manifest:full-path="Pictures/1000000100000AD0000008EA408996E4.png" manifest:media-type="image/png"/>
  <manifest:file-entry manifest:full-path="Pictures/10000000000001E0000003607C66D78D.jpg" manifest:media-type="image/jpeg"/>
  <manifest:file-entry manifest:full-path="Pictures/10000001000004F800000533C39309F9.png" manifest:media-type="image/png"/>
  <manifest:file-entry manifest:full-path="Pictures/10000001000002500000021219CA3571.png" manifest:media-type="image/png"/>
  <manifest:file-entry manifest:full-path="Pictures/10000000000007760000030723A8D14C.png" manifest:media-type="image/png"/>
  <manifest:file-entry manifest:full-path="Pictures/10000000000002D0000005002BC8309F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17365d" draw:textarea-horizontal-align="center" draw:textarea-vertical-align="middle" loext:decorative="false"/>
    </style:style>
    <style:style style:name="gr2" style:family="graphic" style:parent-style-name="standard">
      <style:graphic-properties draw:stroke="none" draw:fill="none" draw:fill-color="#ffffff" fo:min-height="0.65cm" fo:padding-top="0.15cm" fo:padding-bottom="0.15cm" fo:padding-left="0.3cm" fo:padding-right="0.3cm" loext:decorative="false"/>
      <style:paragraph-properties style:writing-mode="lr-tb"/>
    </style:style>
    <style:style style:name="gr3" style:family="graphic" style:parent-style-name="standard">
      <style:graphic-properties draw:stroke="none" draw:fill="none" draw:fill-color="#ffffff" fo:min-height="0.45cm" fo:padding-top="0.15cm" fo:padding-bottom="0.15cm" fo:padding-left="0.3cm" fo:padding-right="0.3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draw:fill="none" draw:fill-color="#ffffff" fo:min-height="0.3cm" fo:padding-top="0.15cm" fo:padding-bottom="0.15cm" fo:padding-left="0.3cm" fo:padding-right="0.3cm" loext:decorative="false"/>
      <style:paragraph-properties style:writing-mode="lr-tb"/>
    </style:style>
    <style:style style:name="gr6" style:family="graphic" style:parent-style-name="standard">
      <style:graphic-properties draw:stroke="none" draw:fill="none" draw:fill-color="#ffffff" fo:min-height="0.15cm" fo:padding-top="0.15cm" fo:padding-bottom="0.15cm" fo:padding-left="0.3cm" fo:padding-right="0.3cm" loext:decorative="false"/>
      <style:paragraph-properties style:writing-mode="lr-tb"/>
    </style:style>
    <style:style style:name="gr7" style:family="graphic">
      <style:graphic-properties style:protect="size" loext:decorative="false"/>
    </style:style>
    <style:style style:name="gr8" style:family="graphic" style:parent-style-name="standard">
      <style:graphic-properties draw:stroke="none" draw:fill="none" draw:fill-color="#ffffff" fo:min-height="0.6cm" fo:padding-top="0.15cm" fo:padding-bottom="0.15cm" fo:padding-left="0.3cm" fo:padding-right="0.3cm" loext:decorative="false"/>
      <style:paragraph-properties style:writing-mode="lr-tb"/>
    </style:style>
    <style:style style:name="gr9" style:family="graphic" style:parent-style-name="standard">
      <style:graphic-properties draw:stroke="none" draw:fill="none" draw:fill-color="#ffffff" fo:min-height="6.25cm" fo:padding-top="0.15cm" fo:padding-bottom="0.15cm" fo:padding-left="0.3cm" fo:padding-right="0.3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fill-color="#ffffff" fo:min-height="0.05cm" fo:padding-top="0.15cm" fo:padding-bottom="0.15cm" fo:padding-left="0.3cm" fo:padding-right="0.3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fill-color="#ffffff" fo:min-height="0.1cm" fo:padding-top="0.15cm" fo:padding-bottom="0.15cm" fo:padding-left="0.3cm" fo:padding-right="0.3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fill-color="#ffffff" fo:min-height="5.75cm" fo:padding-top="0.15cm" fo:padding-bottom="0.15cm" fo:padding-left="0.3cm" fo:padding-right="0.3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fill-color="#ffffff" fo:min-height="6.75cm" fo:padding-top="0.15cm" fo:padding-bottom="0.15cm" fo:padding-left="0.3cm" fo:padding-right="0.3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fill-color="#ffffff" fo:min-height="6.55cm" fo:padding-top="0.15cm" fo:padding-bottom="0.15cm" fo:padding-left="0.3cm" fo:padding-right="0.3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fill-color="#ffffff" fo:min-height="0.2cm" fo:padding-top="0.15cm" fo:padding-bottom="0.15cm" fo:padding-left="0.3cm" fo:padding-right="0.3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fill-color="#ffffff" fo:min-height="0.35cm" fo:padding-top="0.15cm" fo:padding-bottom="0.15cm" fo:padding-left="0.3cm" fo:padding-right="0.3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fill-color="#ffffff" fo:min-height="0.25cm" fo:padding-top="0.15cm" fo:padding-bottom="0.15cm" fo:padding-left="0.3cm" fo:padding-right="0.3cm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solid" draw:fill-color="#17365d"/>
      <style:paragraph-properties fo:text-align="center"/>
    </style:style>
    <style:style style:name="P2" style:family="paragraph">
      <style:paragraph-properties fo:text-align="end"/>
      <style:text-properties fo:color="#ffffff" loext:opacity="100%" fo:font-size="30pt" fo:font-weight="bold"/>
    </style:style>
    <style:style style:name="P3" style:family="paragraph">
      <loext:graphic-properties draw:fill="none" draw:fill-color="#ffffff"/>
      <style:paragraph-properties fo:text-align="end"/>
      <style:text-properties fo:color="#ffffff" loext:opacity="100%" fo:font-size="30pt" fo:font-weight="bold"/>
    </style:style>
    <style:style style:name="P4" style:family="paragraph">
      <style:paragraph-properties fo:text-align="end"/>
      <style:text-properties fo:color="#d9e6f2" loext:opacity="100%" fo:font-size="24pt" fo:font-weight="normal"/>
    </style:style>
    <style:style style:name="P5" style:family="paragraph">
      <loext:graphic-properties draw:fill="none" draw:fill-color="#ffffff"/>
      <style:paragraph-properties fo:text-align="end"/>
      <style:text-properties fo:color="#d9e6f2" loext:opacity="100%" fo:font-size="24pt" fo:font-weight="normal"/>
    </style:style>
    <style:style style:name="P6" style:family="paragraph">
      <style:paragraph-properties fo:text-align="center"/>
    </style:style>
    <style:style style:name="P7" style:family="paragraph">
      <style:paragraph-properties fo:text-align="end"/>
      <style:text-properties fo:color="#ffffff" loext:opacity="100%" fo:font-size="18pt" fo:font-weight="normal"/>
    </style:style>
    <style:style style:name="P8" style:family="paragraph">
      <loext:graphic-properties draw:fill="none" draw:fill-color="#ffffff"/>
      <style:paragraph-properties fo:text-align="end"/>
      <style:text-properties fo:color="#ffffff" loext:opacity="100%" fo:font-size="18pt" fo:font-weight="normal"/>
    </style:style>
    <style:style style:name="P9" style:family="paragraph">
      <style:paragraph-properties fo:text-align="end"/>
      <style:text-properties fo:color="#d9e6f2" loext:opacity="100%" fo:font-size="13pt" fo:font-weight="normal"/>
    </style:style>
    <style:style style:name="P10" style:family="paragraph">
      <loext:graphic-properties draw:fill="none" draw:fill-color="#ffffff"/>
      <style:paragraph-properties fo:text-align="end"/>
      <style:text-properties fo:color="#d9e6f2" loext:opacity="100%" fo:font-size="13pt" fo:font-weight="normal"/>
    </style:style>
    <style:style style:name="P11" style:family="paragraph">
      <loext:graphic-properties draw:fill-color="#ffffff"/>
    </style:style>
    <style:style style:name="P12" style:family="paragraph">
      <style:paragraph-properties fo:text-align="start"/>
      <style:text-properties fo:color="#ffffff" loext:opacity="100%" fo:font-size="23pt" fo:font-weight="bold"/>
    </style:style>
    <style:style style:name="P13" style:family="paragraph">
      <loext:graphic-properties draw:fill="none" draw:fill-color="#ffffff"/>
      <style:paragraph-properties fo:text-align="start"/>
      <style:text-properties fo:color="#ffffff" loext:opacity="100%" fo:font-size="23pt" fo:font-weight="bold"/>
    </style:style>
    <style:style style:name="P14" style:family="paragraph">
      <style:paragraph-properties fo:text-align="start"/>
      <style:text-properties fo:color="#202020" loext:opacity="100%" fo:font-size="19pt" fo:font-weight="normal"/>
    </style:style>
    <style:style style:name="P15" style:family="paragraph">
      <loext:graphic-properties draw:fill="none" draw:fill-color="#ffffff"/>
      <style:paragraph-properties fo:text-align="start"/>
      <style:text-properties fo:color="#202020" loext:opacity="100%" fo:font-size="19pt" fo:font-weight="normal"/>
    </style:style>
    <style:style style:name="P16" style:family="paragraph">
      <style:paragraph-properties fo:text-align="start"/>
      <style:text-properties fo:color="#666666" loext:opacity="100%" fo:font-size="10pt" fo:font-weight="normal"/>
    </style:style>
    <style:style style:name="P17" style:family="paragraph">
      <loext:graphic-properties draw:fill="none" draw:fill-color="#ffffff"/>
      <style:paragraph-properties fo:text-align="start"/>
      <style:text-properties fo:color="#666666" loext:opacity="100%" fo:font-size="10pt" fo:font-weight="normal"/>
    </style:style>
    <style:style style:name="P18" style:family="paragraph">
      <style:paragraph-properties fo:text-align="justify"/>
      <style:text-properties fo:color="#666666" loext:opacity="100%" fo:font-size="10pt" fo:font-weight="normal"/>
    </style:style>
    <style:style style:name="P19" style:family="paragraph">
      <loext:graphic-properties draw:fill="none" draw:fill-color="#ffffff"/>
      <style:paragraph-properties fo:text-align="justify"/>
      <style:text-properties fo:color="#666666" loext:opacity="100%" fo:font-size="10pt" fo:font-weight="normal"/>
    </style:style>
    <style:style style:name="P20" style:family="paragraph">
      <style:paragraph-properties fo:text-align="end"/>
      <style:text-properties fo:color="#666666" loext:opacity="100%" fo:font-size="11pt" fo:font-weight="normal"/>
    </style:style>
    <style:style style:name="P21" style:family="paragraph">
      <loext:graphic-properties draw:fill="none" draw:fill-color="#ffffff"/>
      <style:paragraph-properties fo:text-align="end"/>
      <style:text-properties fo:color="#666666" loext:opacity="100%" fo:font-size="11pt" fo:font-weight="normal"/>
    </style:style>
    <style:style style:name="P22" style:family="paragraph">
      <style:paragraph-properties fo:text-align="end"/>
      <style:text-properties fo:color="#202020" loext:opacity="100%" fo:font-size="19pt" fo:font-weight="normal"/>
    </style:style>
    <style:style style:name="P23" style:family="paragraph">
      <loext:graphic-properties draw:fill="none" draw:fill-color="#ffffff"/>
      <style:paragraph-properties fo:text-align="end"/>
      <style:text-properties fo:color="#202020" loext:opacity="100%" fo:font-size="19pt" fo:font-weight="normal"/>
    </style:style>
    <style:style style:name="P24" style:family="paragraph">
      <style:paragraph-properties fo:text-align="end"/>
      <style:text-properties fo:color="#202020" loext:opacity="100%" fo:font-size="16pt" fo:font-weight="normal"/>
    </style:style>
    <style:style style:name="P25" style:family="paragraph">
      <loext:graphic-properties draw:fill="none" draw:fill-color="#ffffff"/>
      <style:paragraph-properties fo:text-align="end"/>
      <style:text-properties fo:color="#202020" loext:opacity="100%" fo:font-size="16pt" fo:font-weight="normal"/>
    </style:style>
    <style:style style:name="P26" style:family="paragraph">
      <style:paragraph-properties fo:text-align="start"/>
      <style:text-properties fo:color="#202020" loext:opacity="100%" fo:font-size="24pt" fo:font-weight="normal"/>
    </style:style>
    <style:style style:name="P27" style:family="paragraph">
      <loext:graphic-properties draw:fill="none" draw:fill-color="#ffffff"/>
      <style:paragraph-properties fo:text-align="start"/>
      <style:text-properties fo:color="#202020" loext:opacity="100%" fo:font-size="24pt" fo:font-weight="normal"/>
    </style:style>
    <style:style style:name="P28" style:family="paragraph">
      <style:paragraph-properties fo:text-align="end"/>
      <style:text-properties fo:color="#17365d" loext:opacity="100%" fo:font-size="18pt" fo:font-weight="normal"/>
    </style:style>
    <style:style style:name="P29" style:family="paragraph">
      <loext:graphic-properties draw:fill="none" draw:fill-color="#ffffff"/>
      <style:paragraph-properties fo:text-align="end"/>
      <style:text-properties fo:color="#17365d" loext:opacity="100%" fo:font-size="18pt" fo:font-weight="normal"/>
    </style:style>
    <style:style style:name="P30" style:family="paragraph">
      <style:paragraph-properties fo:text-align="start"/>
      <style:text-properties fo:color="#202020" loext:opacity="100%" fo:font-size="21pt" fo:font-weight="normal"/>
    </style:style>
    <style:style style:name="P31" style:family="paragraph">
      <loext:graphic-properties draw:fill="none" draw:fill-color="#ffffff"/>
      <style:paragraph-properties fo:text-align="start"/>
      <style:text-properties fo:color="#202020" loext:opacity="100%" fo:font-size="21pt" fo:font-weight="normal"/>
    </style:style>
    <style:style style:name="P32" style:family="paragraph">
      <style:paragraph-properties fo:text-align="end"/>
      <style:text-properties fo:color="#17365d" loext:opacity="100%" fo:font-size="16pt" fo:font-weight="normal"/>
    </style:style>
    <style:style style:name="P33" style:family="paragraph">
      <loext:graphic-properties draw:fill="none" draw:fill-color="#ffffff"/>
      <style:paragraph-properties fo:text-align="end"/>
      <style:text-properties fo:color="#17365d" loext:opacity="100%" fo:font-size="16pt" fo:font-weight="normal"/>
    </style:style>
    <style:style style:name="P34" style:family="paragraph">
      <style:paragraph-properties fo:text-align="start"/>
      <style:text-properties fo:color="#202020" loext:opacity="100%" fo:font-size="23pt" fo:font-weight="normal"/>
    </style:style>
    <style:style style:name="P35" style:family="paragraph">
      <loext:graphic-properties draw:fill="none" draw:fill-color="#ffffff"/>
      <style:paragraph-properties fo:text-align="start"/>
      <style:text-properties fo:color="#202020" loext:opacity="100%" fo:font-size="23pt" fo:font-weight="normal"/>
    </style:style>
    <style:style style:name="P36" style:family="paragraph">
      <style:paragraph-properties fo:text-align="end"/>
      <style:text-properties fo:color="#17365d" loext:opacity="100%" fo:font-size="19pt" fo:font-weight="bold"/>
    </style:style>
    <style:style style:name="P37" style:family="paragraph">
      <loext:graphic-properties draw:fill="none" draw:fill-color="#ffffff"/>
      <style:paragraph-properties fo:text-align="end"/>
      <style:text-properties fo:color="#17365d" loext:opacity="100%" fo:font-size="19pt"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rect draw:style-name="gr1" draw:text-style-name="P1" draw:layer="layout" svg:width="28cm" svg:height="15.75cm" svg:x="0cm" svg:y="0cm">
          <text:p/>
        </draw:rect>
        <draw:frame draw:style-name="gr2" draw:text-style-name="P3" draw:layer="layout" svg:width="25cm" svg:height="1.482cm" svg:x="1.2cm" svg:y="1.7cm">
          <draw:text-box>
            <text:p text:style-name="P2">TP Integrador — Variante 3</text:p>
          </draw:text-box>
        </draw:frame>
        <draw:frame draw:style-name="gr3" draw:text-style-name="P5" draw:layer="layout" svg:width="25cm" svg:height="1.245cm" svg:x="1.2cm" svg:y="2.7cm">
          <draw:text-box>
            <text:p text:style-name="P4">Caja de comandos física para robot Unitree</text:p>
          </draw:text-box>
        </draw:frame>
        <draw:frame draw:style-name="gr4" draw:text-style-name="P6" draw:layer="layout" svg:width="7cm" svg:height="9cm" svg:x="10.5cm" svg:y="4.1cm">
          <draw:image xlink:href="Pictures/10000000000002D0000005002BC8309F.jpg" xlink:type="simple" xlink:show="embed" xlink:actuate="onLoad" draw:mime-type="image/jpeg">
            <text:p/>
          </draw:image>
        </draw:frame>
        <draw:frame draw:style-name="gr5" draw:text-style-name="P8" draw:layer="layout" svg:width="23cm" svg:height="1.012cm" svg:x="2.5cm" svg:y="13.2cm">
          <draw:text-box>
            <text:p text:style-name="P7">Blue Pill · FreeRTOS · UART · ADC · PWM · EXTI</text:p>
          </draw:text-box>
        </draw:frame>
        <draw:frame draw:style-name="gr6" draw:text-style-name="P10" draw:layer="layout" svg:width="23cm" svg:height="0.813cm" svg:x="2.5cm" svg:y="14.1cm">
          <draw:text-box>
            <text:p text:style-name="P9">Borda Rojas y Castiglioni · Julio 2026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rect draw:style-name="gr1" draw:text-style-name="P1" draw:layer="layout" svg:width="28cm" svg:height="1.5cm" svg:x="0cm" svg:y="0cm">
          <text:p/>
        </draw:rect>
        <draw:frame draw:style-name="gr8" draw:text-style-name="P13" draw:layer="layout" svg:width="24cm" svg:height="1.212cm" svg:x="0.8cm" svg:y="0.25cm">
          <draw:text-box>
            <text:p text:style-name="P12">Objetivo y arquitectura</text:p>
          </draw:text-box>
        </draw:frame>
        <draw:frame draw:style-name="gr4" draw:text-style-name="P6" draw:layer="layout" svg:width="12.5cm" svg:height="8.5cm" svg:x="13.5cm" svg:y="2.2cm">
          <draw:image xlink:href="Pictures/10000000000007760000030723A8D14C.png" xlink:type="simple" xlink:show="embed" xlink:actuate="onLoad" draw:mime-type="image/png">
            <text:p/>
          </draw:image>
        </draw:frame>
        <draw:frame draw:style-name="gr9" draw:text-style-name="P15" draw:layer="layout" svg:width="11.5cm" svg:height="6.55cm" svg:x="1cm" svg:y="2.5cm">
          <draw:text-box>
            <text:p text:style-name="P14">• Pulsador: ciclo PATROL → STOP → DEPLOY → RETURN.</text:p>
            <text:p text:style-name="P14">• Potenciómetro: parámetro auxiliar 0–255.</text:p>
            <text:p text:style-name="P14">• LED y buzzer: realimentación local del modo.</text:p>
            <text:p text:style-name="P14">• UART: eventos, estado y datos con ACK y reintentos.</text:p>
          </draw:text-box>
        </draw:frame>
        <draw:frame draw:style-name="gr10" draw:text-style-name="P17" draw:layer="layout" svg:width="18cm" svg:height="0.695cm" svg:x="0.65cm" svg:y="15.1cm">
          <draw:text-box>
            <text:p text:style-name="P16">TPI-V3 · Sistemas Embebidos · UADE</text:p>
          </draw:text-box>
        </draw:frame>
        <draw:frame draw:style-name="gr10" draw:text-style-name="P19" draw:layer="layout" svg:width="0.7cm" svg:height="0.695cm" svg:x="26.6cm" svg:y="15.1cm">
          <draw:text-box>
            <text:p text:style-name="P18">2</text:p>
          </draw:text-box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rect draw:style-name="gr1" draw:text-style-name="P1" draw:layer="layout" svg:width="28cm" svg:height="1.5cm" svg:x="0cm" svg:y="0cm">
          <text:p/>
        </draw:rect>
        <draw:frame draw:style-name="gr8" draw:text-style-name="P13" draw:layer="layout" svg:width="24cm" svg:height="1.212cm" svg:x="0.8cm" svg:y="0.25cm">
          <draw:text-box>
            <text:p text:style-name="P12">Etapa 1 — Protocolo serie y parser</text:p>
          </draw:text-box>
        </draw:frame>
        <draw:frame draw:style-name="gr4" draw:text-style-name="P6" draw:layer="layout" svg:width="11.5cm" svg:height="8cm" svg:x="14cm" svg:y="2.3cm">
          <draw:image xlink:href="Pictures/10000001000004F800000533C39309F9.png" xlink:type="simple" xlink:show="embed" xlink:actuate="onLoad" draw:mime-type="image/png">
            <text:p/>
          </draw:image>
        </draw:frame>
        <draw:frame draw:style-name="gr4" draw:text-style-name="P6" draw:layer="layout" svg:width="6.5cm" svg:height="3.5cm" svg:x="19cm" svg:y="10.5cm">
          <draw:image xlink:href="Pictures/1000000100000AD0000008EA408996E4.png" xlink:type="simple" xlink:show="embed" xlink:actuate="onLoad" draw:mime-type="image/png">
            <text:p/>
          </draw:image>
        </draw:frame>
        <draw:frame draw:style-name="gr9" draw:text-style-name="P15" draw:layer="layout" svg:width="12cm" svg:height="6.55cm" svg:x="0.9cm" svg:y="2.5cm">
          <draw:text-box>
            <text:p text:style-name="P14">• FSM incremental: consume un byte por vez.</text:p>
            <text:p text:style-name="P14">• Valida longitud, tipo, caracteres y checksum.</text:p>
            <text:p text:style-name="P14">• Resincroniza ante ruido, trama truncada o LL inconsistente.</text:p>
            <text:p text:style-name="P14">• 67 tests de host cubren casos válidos y errores.</text:p>
          </draw:text-box>
        </draw:frame>
        <draw:frame draw:style-name="gr11" draw:text-style-name="P21" draw:layer="layout" svg:width="7.5cm" svg:height="1.165cm" svg:x="18.5cm" svg:y="14.2cm">
          <draw:text-box>
            <text:p text:style-name="P20">Placeholder Lucidchart — revisar/pulir antes de exponer</text:p>
          </draw:text-box>
        </draw:frame>
        <draw:frame draw:style-name="gr10" draw:text-style-name="P17" draw:layer="layout" svg:width="18cm" svg:height="0.695cm" svg:x="0.65cm" svg:y="15.1cm">
          <draw:text-box>
            <text:p text:style-name="P16">TPI-V3 · Sistemas Embebidos · UADE</text:p>
          </draw:text-box>
        </draw:frame>
        <draw:frame draw:style-name="gr10" draw:text-style-name="P19" draw:layer="layout" svg:width="0.7cm" svg:height="0.695cm" svg:x="26.6cm" svg:y="15.1cm">
          <draw:text-box>
            <text:p text:style-name="P18">3</text:p>
          </draw:text-box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rect draw:style-name="gr1" draw:text-style-name="P1" draw:layer="layout" svg:width="28cm" svg:height="1.5cm" svg:x="0cm" svg:y="0cm">
          <text:p/>
        </draw:rect>
        <draw:frame draw:style-name="gr8" draw:text-style-name="P13" draw:layer="layout" svg:width="24cm" svg:height="1.212cm" svg:x="0.8cm" svg:y="0.25cm">
          <draw:text-box>
            <text:p text:style-name="P12">Etapa 1 — Evidencia UART</text:p>
          </draw:text-box>
        </draw:frame>
        <draw:frame draw:style-name="gr4" draw:text-style-name="P6" draw:layer="layout" svg:width="7cm" svg:height="10.5cm" svg:x="17cm" svg:y="2.3cm">
          <draw:image xlink:href="Pictures/10000000000001E0000003604235DF79.jpg" xlink:type="simple" xlink:show="embed" xlink:actuate="onLoad" draw:mime-type="image/jpeg">
            <text:p/>
          </draw:image>
        </draw:frame>
        <draw:frame draw:style-name="gr12" draw:text-style-name="P15" draw:layer="layout" svg:width="14cm" svg:height="6.05cm" svg:x="1cm" svg:y="2.8cm">
          <draw:text-box>
            <text:p text:style-name="P14">• CMD:ping y CMD:mode=ESTOP → ACK:ok.</text:p>
            <text:p text:style-name="P14">• Tramas inválidas → ERR:bounds.</text:p>
            <text:p text:style-name="P14">• ACK detiene los reenvíos periódicos del EVT.</text:p>
            <text:p text:style-name="P14">• Video: evidencia/TPI_V3_Acknowledge.mp4</text:p>
          </draw:text-box>
        </draw:frame>
        <draw:frame draw:style-name="gr10" draw:text-style-name="P17" draw:layer="layout" svg:width="18cm" svg:height="0.695cm" svg:x="0.65cm" svg:y="15.1cm">
          <draw:text-box>
            <text:p text:style-name="P16">TPI-V3 · Sistemas Embebidos · UADE</text:p>
          </draw:text-box>
        </draw:frame>
        <draw:frame draw:style-name="gr10" draw:text-style-name="P19" draw:layer="layout" svg:width="0.7cm" svg:height="0.695cm" svg:x="26.6cm" svg:y="15.1cm">
          <draw:text-box>
            <text:p text:style-name="P18">4</text:p>
          </draw:text-box>
        </draw:fram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rect draw:style-name="gr1" draw:text-style-name="P1" draw:layer="layout" svg:width="28cm" svg:height="1.5cm" svg:x="0cm" svg:y="0cm">
          <text:p/>
        </draw:rect>
        <draw:frame draw:style-name="gr8" draw:text-style-name="P13" draw:layer="layout" svg:width="24cm" svg:height="1.212cm" svg:x="0.8cm" svg:y="0.25cm">
          <draw:text-box>
            <text:p text:style-name="P12">Etapa 2 — Periféricos</text:p>
          </draw:text-box>
        </draw:frame>
        <draw:frame draw:style-name="gr4" draw:text-style-name="P6" draw:layer="layout" svg:width="7cm" svg:height="10.5cm" svg:x="17cm" svg:y="2.3cm">
          <draw:image xlink:href="Pictures/10000000000001E0000003607C66D78D.jpg" xlink:type="simple" xlink:show="embed" xlink:actuate="onLoad" draw:mime-type="image/jpeg">
            <text:p/>
          </draw:image>
        </draw:frame>
        <draw:frame draw:style-name="gr13" draw:text-style-name="P15" draw:layer="layout" svg:width="14.5cm" svg:height="7.05cm" svg:x="0.9cm" svg:y="2.6cm">
          <draw:text-box>
            <text:p text:style-name="P14">• ADC en PA0, muestreado cada 500 ms.</text:p>
            <text:p text:style-name="P14">• TIM2: PWM LED a 1 kHz.</text:p>
            <text:p text:style-name="P14">• TIM4: buzzer pasivo a 2 kHz.</text:p>
            <text:p text:style-name="P14">• EXTI1 + 50 ms: anti-rebote del pulsador.</text:p>
            <text:p text:style-name="P14">• Video: evidencia/TPI_V3_ADC_EXTI_FSM.mp4</text:p>
          </draw:text-box>
        </draw:frame>
        <draw:frame draw:style-name="gr10" draw:text-style-name="P17" draw:layer="layout" svg:width="18cm" svg:height="0.695cm" svg:x="0.65cm" svg:y="15.1cm">
          <draw:text-box>
            <text:p text:style-name="P16">TPI-V3 · Sistemas Embebidos · UADE</text:p>
          </draw:text-box>
        </draw:frame>
        <draw:frame draw:style-name="gr10" draw:text-style-name="P19" draw:layer="layout" svg:width="0.7cm" svg:height="0.695cm" svg:x="26.6cm" svg:y="15.1cm">
          <draw:text-box>
            <text:p text:style-name="P18">5</text:p>
          </draw:text-box>
        </draw:frame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rect draw:style-name="gr1" draw:text-style-name="P1" draw:layer="layout" svg:width="28cm" svg:height="1.5cm" svg:x="0cm" svg:y="0cm">
          <text:p/>
        </draw:rect>
        <draw:frame draw:style-name="gr8" draw:text-style-name="P13" draw:layer="layout" svg:width="24cm" svg:height="1.212cm" svg:x="0.8cm" svg:y="0.25cm">
          <draw:text-box>
            <text:p text:style-name="P12">Etapa 3 — Caja de comandos</text:p>
          </draw:text-box>
        </draw:frame>
        <draw:frame draw:style-name="gr4" draw:text-style-name="P6" draw:layer="layout" svg:width="12.6cm" svg:height="8cm" svg:x="1.1cm" svg:y="2.2cm">
          <draw:image xlink:href="Pictures/1000000000000734000000FE27078A30.png" xlink:type="simple" xlink:show="embed" xlink:actuate="onLoad" draw:mime-type="image/png">
            <text:p/>
          </draw:image>
        </draw:frame>
        <draw:frame draw:style-name="gr4" draw:text-style-name="P6" draw:layer="layout" svg:width="12.5cm" svg:height="8cm" svg:x="14.5cm" svg:y="2.2cm">
          <draw:image xlink:href="Pictures/10000001000006630000040A7C9B6753.png" xlink:type="simple" xlink:show="embed" xlink:actuate="onLoad" draw:mime-type="image/png">
            <text:p/>
          </draw:image>
        </draw:frame>
        <draw:frame draw:style-name="gr3" draw:text-style-name="P23" draw:layer="layout" svg:width="24cm" svg:height="1.046cm" svg:x="2cm" svg:y="11.3cm">
          <draw:text-box>
            <text:p text:style-name="P22">Cada transición emite EVT + STS + DAT y actualiza la señalización local.</text:p>
          </draw:text-box>
        </draw:frame>
        <draw:frame draw:style-name="gr10" draw:text-style-name="P17" draw:layer="layout" svg:width="18cm" svg:height="0.695cm" svg:x="0.65cm" svg:y="15.1cm">
          <draw:text-box>
            <text:p text:style-name="P16">TPI-V3 · Sistemas Embebidos · UADE</text:p>
          </draw:text-box>
        </draw:frame>
        <draw:frame draw:style-name="gr10" draw:text-style-name="P19" draw:layer="layout" svg:width="0.7cm" svg:height="0.695cm" svg:x="26.6cm" svg:y="15.1cm">
          <draw:text-box>
            <text:p text:style-name="P18">6</text:p>
          </draw:text-box>
        </draw:frame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rect draw:style-name="gr1" draw:text-style-name="P1" draw:layer="layout" svg:width="28cm" svg:height="1.5cm" svg:x="0cm" svg:y="0cm">
          <text:p/>
        </draw:rect>
        <draw:frame draw:style-name="gr8" draw:text-style-name="P13" draw:layer="layout" svg:width="24cm" svg:height="1.212cm" svg:x="0.8cm" svg:y="0.25cm">
          <draw:text-box>
            <text:p text:style-name="P12">Confiabilidad: ACK, reintentos y timeout</text:p>
          </draw:text-box>
        </draw:frame>
        <draw:frame draw:style-name="gr4" draw:text-style-name="P6" draw:layer="layout" svg:width="7.5cm" svg:height="10cm" svg:x="16cm" svg:y="2.5cm">
          <draw:image xlink:href="Pictures/10000000000001E0000003604235DF79.jpg" xlink:type="simple" xlink:show="embed" xlink:actuate="onLoad" draw:mime-type="image/jpeg">
            <text:p/>
          </draw:image>
        </draw:frame>
        <draw:frame draw:style-name="gr13" draw:text-style-name="P15" draw:layer="layout" svg:width="14cm" svg:height="7.05cm" svg:x="0.9cm" svg:y="2.8cm">
          <draw:text-box>
            <text:p text:style-name="P14">• EVT pendiente durante 500 ms.</text:p>
            <text:p text:style-name="P14">• Hasta 5 reenvíos del mismo evento.</text:p>
            <text:p text:style-name="P14">• A los 3 s: ERR:timeout y la caja sigue operando.</text:p>
            <text:p text:style-name="P14">• ACK tardío limpia el pendiente.</text:p>
            <text:p text:style-name="P14">• Probado por tests, simulación y UART física.</text:p>
          </draw:text-box>
        </draw:frame>
        <draw:frame draw:style-name="gr10" draw:text-style-name="P17" draw:layer="layout" svg:width="18cm" svg:height="0.695cm" svg:x="0.65cm" svg:y="15.1cm">
          <draw:text-box>
            <text:p text:style-name="P16">TPI-V3 · Sistemas Embebidos · UADE</text:p>
          </draw:text-box>
        </draw:frame>
        <draw:frame draw:style-name="gr10" draw:text-style-name="P19" draw:layer="layout" svg:width="0.7cm" svg:height="0.695cm" svg:x="26.6cm" svg:y="15.1cm">
          <draw:text-box>
            <text:p text:style-name="P18">7</text:p>
          </draw:text-box>
        </draw:frame>
        <presentation:notes draw:style-name="dp2">
          <draw:page-thumbnail draw:style-name="gr7" draw:layer="layout" svg:width="19.798cm" svg:height="11.136cm" svg:x="0.6cm" svg:y="2.257cm" draw:page-number="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rect draw:style-name="gr1" draw:text-style-name="P1" draw:layer="layout" svg:width="28cm" svg:height="1.5cm" svg:x="0cm" svg:y="0cm">
          <text:p/>
        </draw:rect>
        <draw:frame draw:style-name="gr8" draw:text-style-name="P13" draw:layer="layout" svg:width="24cm" svg:height="1.212cm" svg:x="0.8cm" svg:y="0.25cm">
          <draw:text-box>
            <text:p text:style-name="P12">Implementación FreeRTOS</text:p>
          </draw:text-box>
        </draw:frame>
        <draw:frame draw:style-name="gr4" draw:text-style-name="P6" draw:layer="layout" svg:width="12cm" svg:height="8cm" svg:x="14.5cm" svg:y="2.4cm">
          <draw:image xlink:href="Pictures/10000000000007760000030723A8D14C.png" xlink:type="simple" xlink:show="embed" xlink:actuate="onLoad" draw:mime-type="image/png">
            <text:p/>
          </draw:image>
        </draw:frame>
        <draw:frame draw:style-name="gr14" draw:text-style-name="P15" draw:layer="layout" svg:width="13cm" svg:height="6.85cm" svg:x="0.9cm" svg:y="2.7cm">
          <draw:text-box>
            <text:p text:style-name="P14">• USART1 RX encola bytes.</text:p>
            <text:p text:style-name="P14">• EXTI1 arma el anti-rebote.</text:p>
            <text:p text:style-name="P14">• TIM3 aporta base de 1 ms.</text:p>
            <text:p text:style-name="P14">• task_rx_parser, task_app, task_signals y task_uart_tx.</text:p>
            <text:p text:style-name="P14">• Hooks de heap y stack para fallos diagnosticables.</text:p>
          </draw:text-box>
        </draw:frame>
        <draw:frame draw:style-name="gr10" draw:text-style-name="P17" draw:layer="layout" svg:width="18cm" svg:height="0.695cm" svg:x="0.65cm" svg:y="15.1cm">
          <draw:text-box>
            <text:p text:style-name="P16">TPI-V3 · Sistemas Embebidos · UADE</text:p>
          </draw:text-box>
        </draw:frame>
        <draw:frame draw:style-name="gr10" draw:text-style-name="P19" draw:layer="layout" svg:width="0.7cm" svg:height="0.695cm" svg:x="26.6cm" svg:y="15.1cm">
          <draw:text-box>
            <text:p text:style-name="P18">8</text:p>
          </draw:text-box>
        </draw:frame>
        <presentation:notes draw:style-name="dp2">
          <draw:page-thumbnail draw:style-name="gr7" draw:layer="layout" svg:width="19.798cm" svg:height="11.136cm" svg:x="0.6cm" svg:y="2.257cm" draw:page-number="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rect draw:style-name="gr1" draw:text-style-name="P1" draw:layer="layout" svg:width="28cm" svg:height="1.5cm" svg:x="0cm" svg:y="0cm">
          <text:p/>
        </draw:rect>
        <draw:frame draw:style-name="gr8" draw:text-style-name="P13" draw:layer="layout" svg:width="24cm" svg:height="1.212cm" svg:x="0.8cm" svg:y="0.25cm">
          <draw:text-box>
            <text:p text:style-name="P12">Montaje y evidencia física</text:p>
          </draw:text-box>
        </draw:frame>
        <draw:frame draw:style-name="gr4" draw:text-style-name="P6" draw:layer="layout" svg:width="6cm" svg:height="10.5cm" svg:x="3cm" svg:y="2.1cm">
          <draw:image xlink:href="Pictures/10000000000002D0000005002BC8309F.jpg" xlink:type="simple" xlink:show="embed" xlink:actuate="onLoad" draw:mime-type="image/jpeg">
            <text:p/>
          </draw:image>
        </draw:frame>
        <draw:frame draw:style-name="gr4" draw:text-style-name="P6" draw:layer="layout" svg:width="5.5cm" svg:height="9.5cm" svg:x="12cm" svg:y="2.6cm">
          <draw:image xlink:href="Pictures/10000000000001E0000003607C66D78D.jpg" xlink:type="simple" xlink:show="embed" xlink:actuate="onLoad" draw:mime-type="image/jpeg">
            <text:p/>
          </draw:image>
        </draw:frame>
        <draw:frame draw:style-name="gr4" draw:text-style-name="P6" draw:layer="layout" svg:width="5.5cm" svg:height="9.5cm" svg:x="19.5cm" svg:y="2.6cm">
          <draw:image xlink:href="Pictures/10000000000001E0000003604235DF79.jpg" xlink:type="simple" xlink:show="embed" xlink:actuate="onLoad" draw:mime-type="image/jpeg">
            <text:p/>
          </draw:image>
        </draw:frame>
        <draw:frame draw:style-name="gr15" draw:text-style-name="P25" draw:layer="layout" svg:width="23cm" svg:height="0.928cm" svg:x="2.5cm" svg:y="13.2cm">
          <draw:text-box>
            <text:p text:style-name="P24">Montaje · operación de periféricos · confirmación ACK</text:p>
          </draw:text-box>
        </draw:frame>
        <draw:frame draw:style-name="gr10" draw:text-style-name="P17" draw:layer="layout" svg:width="18cm" svg:height="0.695cm" svg:x="0.65cm" svg:y="15.1cm">
          <draw:text-box>
            <text:p text:style-name="P16">TPI-V3 · Sistemas Embebidos · UADE</text:p>
          </draw:text-box>
        </draw:frame>
        <draw:frame draw:style-name="gr10" draw:text-style-name="P19" draw:layer="layout" svg:width="0.7cm" svg:height="0.695cm" svg:x="26.6cm" svg:y="15.1cm">
          <draw:text-box>
            <text:p text:style-name="P18">9</text:p>
          </draw:text-box>
        </draw:frame>
        <presentation:notes draw:style-name="dp2">
          <draw:page-thumbnail draw:style-name="gr7" draw:layer="layout" svg:width="19.798cm" svg:height="11.136cm" svg:x="0.6cm" svg:y="2.257cm" draw:page-number="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rect draw:style-name="gr1" draw:text-style-name="P1" draw:layer="layout" svg:width="28cm" svg:height="1.5cm" svg:x="0cm" svg:y="0cm">
          <text:p/>
        </draw:rect>
        <draw:frame draw:style-name="gr8" draw:text-style-name="P13" draw:layer="layout" svg:width="24cm" svg:height="1.212cm" svg:x="0.8cm" svg:y="0.25cm">
          <draw:text-box>
            <text:p text:style-name="P12">Etapa 4 — Integración con el robot</text:p>
          </draw:text-box>
        </draw:frame>
        <draw:frame draw:style-name="gr4" draw:text-style-name="P6" draw:layer="layout" svg:width="8.5cm" svg:height="7cm" svg:x="16.5cm" svg:y="2.6cm">
          <draw:image xlink:href="Pictures/10000001000002500000021219CA3571.png" xlink:type="simple" xlink:show="embed" xlink:actuate="onLoad" draw:mime-type="image/png">
            <text:p/>
          </draw:image>
        </draw:frame>
        <draw:frame draw:style-name="gr9" draw:text-style-name="P15" draw:layer="layout" svg:width="14.5cm" svg:height="6.55cm" svg:x="0.9cm" svg:y="2.9cm">
          <draw:text-box>
            <text:p text:style-name="P14">• Validado: firmware, UART, parser, periféricos y reintentos.</text:p>
            <text:p text:style-name="P14">• Pendiente de laboratorio: tópicos ROS 2 y latencia extremo a extremo.</text:p>
            <text:p text:style-name="P14">• No se fabrican mediciones del bridge o del robot.</text:p>
            <text:p text:style-name="P14">• La defensa puede demostrar el prototipo, las tramas y los videos.</text:p>
          </draw:text-box>
        </draw:frame>
        <draw:frame draw:style-name="gr10" draw:text-style-name="P17" draw:layer="layout" svg:width="18cm" svg:height="0.695cm" svg:x="0.65cm" svg:y="15.1cm">
          <draw:text-box>
            <text:p text:style-name="P16">TPI-V3 · Sistemas Embebidos · UADE</text:p>
          </draw:text-box>
        </draw:frame>
        <draw:frame draw:style-name="gr10" draw:text-style-name="P19" draw:layer="layout" svg:width="0.7cm" svg:height="1.089cm" svg:x="26.6cm" svg:y="15.1cm">
          <draw:text-box>
            <text:p text:style-name="P18">10</text:p>
          </draw:text-box>
        </draw:frame>
        <presentation:notes draw:style-name="dp2">
          <draw:page-thumbnail draw:style-name="gr7" draw:layer="layout" svg:width="19.798cm" svg:height="11.136cm" svg:x="0.6cm" svg:y="2.257cm" draw:page-number="1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rect draw:style-name="gr1" draw:text-style-name="P1" draw:layer="layout" svg:width="28cm" svg:height="1.5cm" svg:x="0cm" svg:y="0cm">
          <text:p/>
        </draw:rect>
        <draw:frame draw:style-name="gr8" draw:text-style-name="P13" draw:layer="layout" svg:width="24cm" svg:height="1.212cm" svg:x="0.8cm" svg:y="0.25cm">
          <draw:text-box>
            <text:p text:style-name="P12">Diagramas Lucidchart — placeholders</text:p>
          </draw:text-box>
        </draw:frame>
        <draw:frame draw:style-name="gr4" draw:text-style-name="P6" draw:layer="layout" svg:width="7.6cm" svg:height="5cm" svg:x="1cm" svg:y="2.3cm">
          <draw:image xlink:href="Pictures/1000000100001ACD00000DDC1D9DC53C.png" xlink:type="simple" xlink:show="embed" xlink:actuate="onLoad" draw:mime-type="image/png">
            <text:p/>
          </draw:image>
        </draw:frame>
        <draw:frame draw:style-name="gr4" draw:text-style-name="P6" draw:layer="layout" svg:width="7.6cm" svg:height="5cm" svg:x="9.8cm" svg:y="2.3cm">
          <draw:image xlink:href="Pictures/10000001000010C400000AC4FDC9457F.png" xlink:type="simple" xlink:show="embed" xlink:actuate="onLoad" draw:mime-type="image/png">
            <text:p/>
          </draw:image>
        </draw:frame>
        <draw:frame draw:style-name="gr4" draw:text-style-name="P6" draw:layer="layout" svg:width="7.6cm" svg:height="5cm" svg:x="18.6cm" svg:y="2.3cm">
          <draw:image xlink:href="Pictures/100000010000049A00000850F6FB73B8.png" xlink:type="simple" xlink:show="embed" xlink:actuate="onLoad" draw:mime-type="image/png">
            <text:p/>
          </draw:image>
        </draw:frame>
        <draw:frame draw:style-name="gr16" draw:text-style-name="P25" draw:layer="layout" svg:width="24cm" svg:height="1.555cm" svg:x="1.8cm" svg:y="12.5cm">
          <draw:text-box>
            <text:p text:style-name="P24">Usarlos como apoyo narrativo; los diagramas propios y el código son la referencia técnica vigente.</text:p>
          </draw:text-box>
        </draw:frame>
        <draw:frame draw:style-name="gr10" draw:text-style-name="P17" draw:layer="layout" svg:width="18cm" svg:height="0.695cm" svg:x="0.65cm" svg:y="15.1cm">
          <draw:text-box>
            <text:p text:style-name="P16">TPI-V3 · Sistemas Embebidos · UADE</text:p>
          </draw:text-box>
        </draw:frame>
        <draw:frame draw:style-name="gr10" draw:text-style-name="P19" draw:layer="layout" svg:width="0.7cm" svg:height="1.089cm" svg:x="26.6cm" svg:y="15.1cm">
          <draw:text-box>
            <text:p text:style-name="P18">11</text:p>
          </draw:text-box>
        </draw:frame>
        <presentation:notes draw:style-name="dp2">
          <draw:page-thumbnail draw:style-name="gr7" draw:layer="layout" svg:width="19.798cm" svg:height="11.136cm" svg:x="0.6cm" svg:y="2.257cm" draw:page-number="1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rect draw:style-name="gr1" draw:text-style-name="P1" draw:layer="layout" svg:width="28cm" svg:height="1.5cm" svg:x="0cm" svg:y="0cm">
          <text:p/>
        </draw:rect>
        <draw:frame draw:style-name="gr8" draw:text-style-name="P13" draw:layer="layout" svg:width="24cm" svg:height="1.212cm" svg:x="0.8cm" svg:y="0.25cm">
          <draw:text-box>
            <text:p text:style-name="P12">Validación y calidad</text:p>
          </draw:text-box>
        </draw:frame>
        <draw:frame draw:style-name="gr4" draw:text-style-name="P6" draw:layer="layout" svg:width="9.5cm" svg:height="7.5cm" svg:x="15.7cm" svg:y="2.4cm">
          <draw:image xlink:href="Pictures/1000000100001ACD0000283ADEFF56A8.png" xlink:type="simple" xlink:show="embed" xlink:actuate="onLoad" draw:mime-type="image/png">
            <text:p/>
          </draw:image>
        </draw:frame>
        <draw:frame draw:style-name="gr9" draw:text-style-name="P15" draw:layer="layout" svg:width="14cm" svg:height="6.55cm" svg:x="0.9cm" svg:y="2.8cm">
          <draw:text-box>
            <text:p text:style-name="P14">• 67 tests de host: protocolo, parser, variante y señales.</text:p>
            <text:p text:style-name="P14">• CI: make test + compilación ARM + tamaño.</text:p>
            <text:p text:style-name="P14">• Simulación: bridge responde ACK o fuerza timeout.</text:p>
            <text:p text:style-name="P14">• Hardware: LED, buzzer, botón, ADC y UART.</text:p>
          </draw:text-box>
        </draw:frame>
        <draw:frame draw:style-name="gr11" draw:text-style-name="P21" draw:layer="layout" svg:width="9cm" svg:height="1.165cm" svg:x="17cm" svg:y="10.8cm">
          <draw:text-box>
            <text:p text:style-name="P20">Placeholder Lucidchart — consolidar versión final</text:p>
          </draw:text-box>
        </draw:frame>
        <draw:frame draw:style-name="gr10" draw:text-style-name="P17" draw:layer="layout" svg:width="18cm" svg:height="0.695cm" svg:x="0.65cm" svg:y="15.1cm">
          <draw:text-box>
            <text:p text:style-name="P16">TPI-V3 · Sistemas Embebidos · UADE</text:p>
          </draw:text-box>
        </draw:frame>
        <draw:frame draw:style-name="gr10" draw:text-style-name="P19" draw:layer="layout" svg:width="0.7cm" svg:height="1.089cm" svg:x="26.6cm" svg:y="15.1cm">
          <draw:text-box>
            <text:p text:style-name="P18">12</text:p>
          </draw:text-box>
        </draw:frame>
        <presentation:notes draw:style-name="dp2">
          <draw:page-thumbnail draw:style-name="gr7" draw:layer="layout" svg:width="19.798cm" svg:height="11.136cm" svg:x="0.6cm" svg:y="2.257cm" draw:page-number="1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rect draw:style-name="gr1" draw:text-style-name="P1" draw:layer="layout" svg:width="28cm" svg:height="1.5cm" svg:x="0cm" svg:y="0cm">
          <text:p/>
        </draw:rect>
        <draw:frame draw:style-name="gr8" draw:text-style-name="P13" draw:layer="layout" svg:width="24cm" svg:height="1.212cm" svg:x="0.8cm" svg:y="0.25cm">
          <draw:text-box>
            <text:p text:style-name="P12">Cierre y guion de demostración</text:p>
          </draw:text-box>
        </draw:frame>
        <draw:frame draw:style-name="gr13" draw:text-style-name="P27" draw:layer="layout" svg:width="23cm" svg:height="7.05cm" svg:x="1.8cm" svg:y="2.8cm">
          <draw:text-box>
            <text:p text:style-name="P26">• 1. Presentar el montaje y el objetivo.</text:p>
            <text:p text:style-name="P26">• 2. Pulsar: mostrar cambio de modo, LED, buzzer y tramas.</text:p>
            <text:p text:style-name="P26">• 3. Mostrar ACK:ok y explicar la política de reintento.</text:p>
            <text:p text:style-name="P26">• 4. Enviar una trama inválida y observar ERR:bounds.</text:p>
            <text:p text:style-name="P26">• 5. Cerrar con tests/CI y alcance pendiente de ROS 2.</text:p>
          </draw:text-box>
        </draw:frame>
        <draw:frame draw:style-name="gr17" draw:text-style-name="P29" draw:layer="layout" svg:width="21cm" svg:height="1.012cm" svg:x="3.5cm" svg:y="12.4cm">
          <draw:text-box>
            <text:p text:style-name="P28">Repositorio: github.com/jiborjas/TPI-V3</text:p>
          </draw:text-box>
        </draw:frame>
        <draw:frame draw:style-name="gr10" draw:text-style-name="P17" draw:layer="layout" svg:width="18cm" svg:height="0.695cm" svg:x="0.65cm" svg:y="15.1cm">
          <draw:text-box>
            <text:p text:style-name="P16">TPI-V3 · Sistemas Embebidos · UADE</text:p>
          </draw:text-box>
        </draw:frame>
        <draw:frame draw:style-name="gr10" draw:text-style-name="P19" draw:layer="layout" svg:width="0.7cm" svg:height="1.089cm" svg:x="26.6cm" svg:y="15.1cm">
          <draw:text-box>
            <text:p text:style-name="P18">13</text:p>
          </draw:text-box>
        </draw:frame>
        <presentation:notes draw:style-name="dp2">
          <draw:page-thumbnail draw:style-name="gr7" draw:layer="layout" svg:width="19.798cm" svg:height="11.136cm" svg:x="0.6cm" svg:y="2.257cm" draw:page-number="1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rect draw:style-name="gr1" draw:text-style-name="P1" draw:layer="layout" svg:width="28cm" svg:height="1.5cm" svg:x="0cm" svg:y="0cm">
          <text:p/>
        </draw:rect>
        <draw:frame draw:style-name="gr8" draw:text-style-name="P13" draw:layer="layout" svg:width="24cm" svg:height="1.212cm" svg:x="0.8cm" svg:y="0.25cm">
          <draw:text-box>
            <text:p text:style-name="P12">Preguntas obligatorias — Etapa 1</text:p>
          </draw:text-box>
        </draw:frame>
        <draw:frame draw:style-name="gr13" draw:text-style-name="P31" draw:layer="layout" svg:width="25cm" svg:height="7.05cm" svg:x="1.1cm" svg:y="2.6cm">
          <draw:text-box>
            <text:p text:style-name="P30">• ¿Por qué byte a byte? La UART es un flujo sin alineación; la FSM no bloquea.</text:p>
            <text:p text:style-name="P30">• ¿Tramas pegadas? LL delimita el cuerpo y permite volver a WAIT_START.</text:p>
            <text:p text:style-name="P30">• ¿Checksum? XOR sobre LL:TTT:PAYLOAD; el encoder y parser calculan lo mismo.</text:p>
            <text:p text:style-name="P30">• ¿LL inconsistente? Se informa ERR:bounds y se resincroniza ante un nuevo @.</text:p>
          </draw:text-box>
        </draw:frame>
        <draw:frame draw:style-name="gr17" draw:text-style-name="P33" draw:layer="layout" svg:width="24cm" svg:height="0.928cm" svg:x="1.8cm" svg:y="12.5cm">
          <draw:text-box>
            <text:p text:style-name="P32">Buenas prácticas: memoria acotada · validación de frontera · recuperación ante error</text:p>
          </draw:text-box>
        </draw:frame>
        <draw:frame draw:style-name="gr10" draw:text-style-name="P17" draw:layer="layout" svg:width="18cm" svg:height="0.695cm" svg:x="0.65cm" svg:y="15.1cm">
          <draw:text-box>
            <text:p text:style-name="P16">TPI-V3 · Sistemas Embebidos · UADE</text:p>
          </draw:text-box>
        </draw:frame>
        <draw:frame draw:style-name="gr10" draw:text-style-name="P19" draw:layer="layout" svg:width="0.7cm" svg:height="1.089cm" svg:x="26.6cm" svg:y="15.1cm">
          <draw:text-box>
            <text:p text:style-name="P18">14</text:p>
          </draw:text-box>
        </draw:frame>
        <presentation:notes draw:style-name="dp2">
          <draw:page-thumbnail draw:style-name="gr7" draw:layer="layout" svg:width="19.798cm" svg:height="11.136cm" svg:x="0.6cm" svg:y="2.257cm" draw:page-number="1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rect draw:style-name="gr1" draw:text-style-name="P1" draw:layer="layout" svg:width="28cm" svg:height="1.5cm" svg:x="0cm" svg:y="0cm">
          <text:p/>
        </draw:rect>
        <draw:frame draw:style-name="gr8" draw:text-style-name="P13" draw:layer="layout" svg:width="24cm" svg:height="1.212cm" svg:x="0.8cm" svg:y="0.25cm">
          <draw:text-box>
            <text:p text:style-name="P12">Preguntas obligatorias — Etapa 2</text:p>
          </draw:text-box>
        </draw:frame>
        <draw:frame draw:style-name="gr13" draw:text-style-name="P31" draw:layer="layout" svg:width="25cm" svg:height="7.05cm" svg:x="1.1cm" svg:y="2.6cm">
          <draw:text-box>
            <text:p text:style-name="P30">• PWM: PSC=71 y ARR=999 → 1 kHz con reloj de timer a 72 MHz.</text:p>
            <text:p text:style-name="P30">• ADC: duty=(adc×100)/4095; en Variante 3 se usa param=(adc×255)/4095.</text:p>
            <text:p text:style-name="P30">• Timers: PSC y ARR son comunes a todos los canales; por eso LED y buzzer usan timers distintos.</text:p>
            <text:p text:style-name="P30">• PWM requiere salida alternativa push-pull (AF push-pull) en STM32F1.</text:p>
          </draw:text-box>
        </draw:frame>
        <draw:frame draw:style-name="gr17" draw:text-style-name="P33" draw:layer="layout" svg:width="24cm" svg:height="0.928cm" svg:x="1.8cm" svg:y="12.5cm">
          <draw:text-box>
            <text:p text:style-name="P32">Buenas prácticas: cálculos reproducibles · tipos enteros acotados · un timer por función</text:p>
          </draw:text-box>
        </draw:frame>
        <draw:frame draw:style-name="gr10" draw:text-style-name="P17" draw:layer="layout" svg:width="18cm" svg:height="0.695cm" svg:x="0.65cm" svg:y="15.1cm">
          <draw:text-box>
            <text:p text:style-name="P16">TPI-V3 · Sistemas Embebidos · UADE</text:p>
          </draw:text-box>
        </draw:frame>
        <draw:frame draw:style-name="gr10" draw:text-style-name="P19" draw:layer="layout" svg:width="0.7cm" svg:height="1.089cm" svg:x="26.6cm" svg:y="15.1cm">
          <draw:text-box>
            <text:p text:style-name="P18">15</text:p>
          </draw:text-box>
        </draw:frame>
        <presentation:notes draw:style-name="dp2">
          <draw:page-thumbnail draw:style-name="gr7" draw:layer="layout" svg:width="19.798cm" svg:height="11.136cm" svg:x="0.6cm" svg:y="2.257cm" draw:page-number="1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rect draw:style-name="gr1" draw:text-style-name="P1" draw:layer="layout" svg:width="28cm" svg:height="1.5cm" svg:x="0cm" svg:y="0cm">
          <text:p/>
        </draw:rect>
        <draw:frame draw:style-name="gr8" draw:text-style-name="P13" draw:layer="layout" svg:width="24cm" svg:height="1.212cm" svg:x="0.8cm" svg:y="0.25cm">
          <draw:text-box>
            <text:p text:style-name="P12">Preguntas obligatorias — Etapa 3</text:p>
          </draw:text-box>
        </draw:frame>
        <draw:frame draw:style-name="gr13" draw:text-style-name="P31" draw:layer="layout" svg:width="25cm" svg:height="7.05cm" svg:x="1.1cm" svg:y="2.6cm">
          <draw:text-box>
            <text:p text:style-name="P30">• No hay superloop: ISR mínimas + tareas FreeRTOS con responsabilidades separadas.</text:p>
            <text:p text:style-name="P30">• Sin ACK: reenvío cada 500 ms, hasta 5 veces; a los 3 s se emite ERR:timeout.</text:p>
            <text:p text:style-name="P30">• Payloads numéricos: snprintf con ancho fijo (param=%03u, adc=%04u).</text:p>
            <text:p text:style-name="P30">• TIM2 LED, TIM4 buzzer, TIM3 base de 1 ms; SysTick para tiempos blandos.</text:p>
          </draw:text-box>
        </draw:frame>
        <draw:frame draw:style-name="gr17" draw:text-style-name="P33" draw:layer="layout" svg:width="24cm" svg:height="1.555cm" svg:x="1.8cm" svg:y="12.5cm">
          <draw:text-box>
            <text:p text:style-name="P32">Buenas prácticas: no bloquear ISR · colas entre contextos · degradación segura · estado local preservado</text:p>
          </draw:text-box>
        </draw:frame>
        <draw:frame draw:style-name="gr10" draw:text-style-name="P17" draw:layer="layout" svg:width="18cm" svg:height="0.695cm" svg:x="0.65cm" svg:y="15.1cm">
          <draw:text-box>
            <text:p text:style-name="P16">TPI-V3 · Sistemas Embebidos · UADE</text:p>
          </draw:text-box>
        </draw:frame>
        <draw:frame draw:style-name="gr10" draw:text-style-name="P19" draw:layer="layout" svg:width="0.7cm" svg:height="1.089cm" svg:x="26.6cm" svg:y="15.1cm">
          <draw:text-box>
            <text:p text:style-name="P18">16</text:p>
          </draw:text-box>
        </draw:frame>
        <presentation:notes draw:style-name="dp2">
          <draw:page-thumbnail draw:style-name="gr7" draw:layer="layout" svg:width="19.798cm" svg:height="11.136cm" svg:x="0.6cm" svg:y="2.257cm" draw:page-number="1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rect draw:style-name="gr1" draw:text-style-name="P1" draw:layer="layout" svg:width="28cm" svg:height="1.5cm" svg:x="0cm" svg:y="0cm">
          <text:p/>
        </draw:rect>
        <draw:frame draw:style-name="gr8" draw:text-style-name="P13" draw:layer="layout" svg:width="24cm" svg:height="1.212cm" svg:x="0.8cm" svg:y="0.25cm">
          <draw:text-box>
            <text:p text:style-name="P12">Preguntas obligatorias — Etapa 4</text:p>
          </draw:text-box>
        </draw:frame>
        <draw:frame draw:style-name="gr13" draw:text-style-name="P31" draw:layer="layout" svg:width="25cm" svg:height="7.05cm" svg:x="1.1cm" svg:y="2.6cm">
          <draw:text-box>
            <text:p text:style-name="P30">• Tópicos: se identifican en laboratorio con ros2 topic list/echo; el firmware respeta el contrato de tramas.</text:p>
            <text:p text:style-name="P30">• Latencia: presupuesto local ≈60 ms; la medición extremo a extremo se declara pendiente.</text:p>
            <text:p text:style-name="P30">• Falla de bridge: recuperación automática con ACK tardío o ERR:timeout sin reset manual.</text:p>
            <text:p text:style-name="P30">• Extensión: nuevo EVT:cmd_* sin cambiar framing, checksum, parser ni política de ACK.</text:p>
          </draw:text-box>
        </draw:frame>
        <draw:frame draw:style-name="gr17" draw:text-style-name="P33" draw:layer="layout" svg:width="24cm" svg:height="1.555cm" svg:x="1.8cm" svg:y="12.5cm">
          <draw:text-box>
            <text:p text:style-name="P32">Buenas prácticas: no inventar mediciones · separar transporte de semántica · plan de verificación reproducible</text:p>
          </draw:text-box>
        </draw:frame>
        <draw:frame draw:style-name="gr10" draw:text-style-name="P17" draw:layer="layout" svg:width="18cm" svg:height="0.695cm" svg:x="0.65cm" svg:y="15.1cm">
          <draw:text-box>
            <text:p text:style-name="P16">TPI-V3 · Sistemas Embebidos · UADE</text:p>
          </draw:text-box>
        </draw:frame>
        <draw:frame draw:style-name="gr10" draw:text-style-name="P19" draw:layer="layout" svg:width="0.7cm" svg:height="1.089cm" svg:x="26.6cm" svg:y="15.1cm">
          <draw:text-box>
            <text:p text:style-name="P18">17</text:p>
          </draw:text-box>
        </draw:frame>
        <presentation:notes draw:style-name="dp2">
          <draw:page-thumbnail draw:style-name="gr7" draw:layer="layout" svg:width="19.798cm" svg:height="11.136cm" svg:x="0.6cm" svg:y="2.257cm" draw:page-number="1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rect draw:style-name="gr1" draw:text-style-name="P1" draw:layer="layout" svg:width="28cm" svg:height="1.5cm" svg:x="0cm" svg:y="0cm">
          <text:p/>
        </draw:rect>
        <draw:frame draw:style-name="gr8" draw:text-style-name="P13" draw:layer="layout" svg:width="24cm" svg:height="1.212cm" svg:x="0.8cm" svg:y="0.25cm">
          <draw:text-box>
            <text:p text:style-name="P12">Checklist para la defensa oral</text:p>
          </draw:text-box>
        </draw:frame>
        <draw:frame draw:style-name="gr9" draw:text-style-name="P35" draw:layer="layout" svg:width="25cm" svg:height="7.589cm" svg:x="1.1cm" svg:y="2.7cm">
          <draw:text-box>
            <text:p text:style-name="P34">• Mostrar cada pregunta obligatoria junto con la evidencia correspondiente.</text:p>
            <text:p text:style-name="P34">• Primero: diagrama + implementación; después: test, consola o video.</text:p>
            <text:p text:style-name="P34">• Distinguir claramente “validado en placa” de “pendiente de laboratorio”.</text:p>
            <text:p text:style-name="P34">• Cerrar con el repositorio, CI y la demostración en vivo del prototipo.</text:p>
          </draw:text-box>
        </draw:frame>
        <draw:frame draw:style-name="gr16" draw:text-style-name="P37" draw:layer="layout" svg:width="23cm" svg:height="1.791cm" svg:x="2.5cm" svg:y="12cm">
          <draw:text-box>
            <text:p text:style-name="P36">Resultado: trazabilidad entre enunciado, código, pruebas y evidencia física.</text:p>
          </draw:text-box>
        </draw:frame>
        <draw:frame draw:style-name="gr10" draw:text-style-name="P17" draw:layer="layout" svg:width="18cm" svg:height="0.695cm" svg:x="0.65cm" svg:y="15.1cm">
          <draw:text-box>
            <text:p text:style-name="P16">TPI-V3 · Sistemas Embebidos · UADE</text:p>
          </draw:text-box>
        </draw:frame>
        <draw:frame draw:style-name="gr10" draw:text-style-name="P19" draw:layer="layout" svg:width="0.7cm" svg:height="1.089cm" svg:x="26.6cm" svg:y="15.1cm">
          <draw:text-box>
            <text:p text:style-name="P18">18</text:p>
          </draw:text-box>
        </draw:frame>
        <presentation:notes draw:style-name="dp2">
          <draw:page-thumbnail draw:style-name="gr7" draw:layer="layout" svg:width="19.798cm" svg:height="11.136cm" svg:x="0.6cm" svg:y="2.257cm" draw:page-number="1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15T12:35:41.613728124</meta:creation-date>
    <dc:date>2026-07-15T12:35:45.247313880</dc:date>
    <meta:editing-duration>PT3S</meta:editing-duration>
    <meta:editing-cycles>1</meta:editing-cycles>
    <meta:document-statistic meta:object-count="173"/>
    <meta:generator>LibreOffice/24.2.7.2$Linux_X86_64 LibreOffice_project/420$Build-2</meta:generator>
  </office:meta>
</office:document-meta>
</file>